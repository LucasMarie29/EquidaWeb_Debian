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Paragraphedeliste" style:list-style-name="LFO1" style:family="paragraph"/>
    <style:style style:name="P10" style:parent-style-name="Paragraphedeliste" style:list-style-name="LFO1" style:family="paragraph"/>
    <style:style style:name="P11" style:parent-style-name="Paragraphedeliste" style:list-style-name="LFO1" style:family="paragraph"/>
    <style:style style:name="P12" style:parent-style-name="Paragraphedeliste" style:list-style-name="LFO1" style:family="paragraph"/>
    <style:style style:name="P13" style:parent-style-name="Paragraphedeliste" style:list-style-name="LFO1" style:family="paragraph"/>
    <style:style style:name="P14" style:parent-style-name="Paragraphedeliste" style:list-style-name="LFO1" style:family="paragraph"/>
    <style:style style:name="P15" style:parent-style-name="Paragraphedeliste" style:list-style-name="LFO1" style:family="paragraph"/>
    <style:style style:name="P16" style:parent-style-name="Paragraphedeliste" style:list-style-name="LFO1" style:family="paragraph"/>
    <style:style style:name="P17" style:parent-style-name="Paragraphedeliste" style:list-style-name="LFO1" style:family="paragraph"/>
    <style:style style:name="P18" style:parent-style-name="Paragraphedeliste" style:family="paragraph">
      <style:paragraph-properties fo:margin-left="0.7395in">
        <style:tab-stops/>
      </style:paragraph-properties>
    </style:style>
    <style:style style:name="P19" style:parent-style-name="Paragraphedeliste" style:list-style-name="LFO1" style:family="paragraph"/>
    <style:style style:name="P20" style:parent-style-name="Paragraphedeliste" style:list-style-name="LFO1" style:family="paragraph"/>
    <style:style style:name="P21" style:parent-style-name="Paragraphedeliste" style:list-style-name="LFO1" style:family="paragraph"/>
    <style:style style:name="P22" style:parent-style-name="Paragraphedeliste" style:list-style-name="LFO1" style:family="paragraph"/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line-break/>1. Contexte</text:p>
      <text:p text:style-name="Normal">Equida est une application web<text:s/>JEE<text:s/>permettant les gestions de ventes<text:s/>aux enchères<text:s/>de chevaux de course.</text:p>
      <text:p text:style-name="Normal">2. Expression du besoin</text:p>
      <text:p text:style-name="Normal">Ajout de la gestion complète des lots (liste/ajout/modification/suppression)</text:p>
      <text:p text:style-name="Normal">3.<text:s/>MCD<text:line-break/><text:line-break/><draw:frame draw:style-name="a0" draw:name="Image 1" text:anchor-type="as-char" svg:x="0in" svg:y="0in" svg:width="6.3in" svg:height="2.87014in" style:rel-width="scale" style:rel-height="scale"><draw:image xlink:href="media/image1.png" xlink:type="simple" xlink:show="embed" xlink:actuate="onLoad"/><svg:title/><svg:desc/></draw:frame><text:line-break/></text:p>
      <text:p text:style-name="Normal">4. User story</text:p>
      <text:p text:style-name="Normal">Un cheval peut figurer dans plusieurs lots (plusieurs ventes)</text:p>
      <text:p text:style-name="Normal">Un lot contient 1 et 1 seul cheval</text:p>
      <text:p text:style-name="Normal">Un lot possède 1<text:s/>et<text:s/>une seule vente</text:p>
      <text:p text:style-name="Normal">Une vente possède 0 ou plusieurs lots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5. Wireframes et navigation</text:p>
      <text:soft-page-break/>
      <text:p text:style-name="Normal"><draw:frame draw:style-name="a1" draw:name="Image 1" text:anchor-type="as-char" svg:x="0in" svg:y="0in" svg:width="6.29167in" svg:height="3.88542in" style:rel-width="scale" style:rel-height="scale"><draw:image xlink:href="media/image2.png" xlink:type="simple" xlink:show="embed" xlink:actuate="onLoad"/><svg:title/><svg:desc/></draw:frame><text:line-break/>Explication des ajouts à faire :<text:line-break/>1. Couche model</text:p>
      <text:p text:style-name="Normal">Ajout de la table lot dans la bdd</text:p>
      <text:p text:style-name="Normal">2. Couche controller</text:p>
      <text:p text:style-name="Normal">Création du fichier DAOLot.java :</text:p>
      <text:list text:style-name="LFO1" text:continue-numbering="true">
        <text:list-item>
          <text:p text:style-name="P2">Création des méthodes :<text:s/></text:p>
          <text:list text:continue-numbering="true">
            <text:list-item>
              <text:p text:style-name="P3">getLeLot()</text:p>
            </text:list-item>
            <text:list-item>
              <text:p text:style-name="P4">getLesLots()</text:p>
            </text:list-item>
            <text:list-item>
              <text:p text:style-name="P5">ajouterLot()</text:p>
            </text:list-item>
            <text:list-item>
              <text:p text:style-name="P6">supprimerLot()</text:p>
            </text:list-item>
            <text:list-item>
              <text:p text:style-name="P7">modifierLot()</text:p>
            </text:list-item>
          </text:list>
        </text:list-item>
      </text:list>
      <text:p text:style-name="Normal">Création du fichier LotServlet.java :</text:p>
      <text:list text:style-name="LFO1" text:continue-numbering="true">
        <text:list-item>
          <text:p text:style-name="P8">Création des routes :</text:p>
          <text:list text:continue-numbering="true">
            <text:list-item>
              <text:p text:style-name="P9">/list</text:p>
            </text:list-item>
            <text:list-item>
              <text:p text:style-name="P10">/show</text:p>
            </text:list-item>
            <text:list-item>
              <text:p text:style-name="P11">/add</text:p>
            </text:list-item>
            <text:list-item>
              <text:p text:style-name="P12">/delete</text:p>
            </text:list-item>
            <text:list-item>
              <text:p text:style-name="P13">/edit</text:p>
            </text:list-item>
          </text:list>
        </text:list-item>
      </text:list>
      <text:p text:style-name="Normal"/>
      <text:p text:style-name="Normal">3. Couche view</text:p>
      <text:soft-page-break/>
      <text:p text:style-name="Normal">Création de pages JSP :</text:p>
      <text:list text:style-name="LFO1" text:continue-numbering="true">
        <text:list-item>
          <text:p text:style-name="P14">List.jsp</text:p>
        </text:list-item>
        <text:list-item>
          <text:p text:style-name="P15">Show.jsp</text:p>
        </text:list-item>
        <text:list-item>
          <text:p text:style-name="P16">Add.jsp</text:p>
        </text:list-item>
        <text:list-item>
          <text:p text:style-name="P17">Edit.jsp</text:p>
        </text:list-item>
      </text:list>
      <text:p text:style-name="P18"/>
      <text:p text:style-name="Normal"><text:line-break/><text:line-break/>TEST :</text:p>
      <text:list text:style-name="LFO1" text:continue-numbering="true">
        <text:list-item>
          <text:p text:style-name="P19">Lister les lots</text:p>
        </text:list-item>
        <text:list-item>
          <text:p text:style-name="P20">Voir un lot</text:p>
        </text:list-item>
        <text:list-item>
          <text:p text:style-name="P21">Modifier un lot</text:p>
        </text:list-item>
        <text:list-item>
          <text:p text:style-name="P22">Supprimer un lot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PréformatéHTML" style:display-name="Préformaté HTML" style:family="paragraph" style:parent-style-name="Normal">
      <style:paragraph-properties fo:margin-bottom="0in" fo:line-height="100%"/>
      <style:text-properties style:font-name="Consolas" fo:font-size="10pt" style:font-size-asian="10pt" style:font-size-complex="10pt" fo:hyphenate="false"/>
    </style:style>
    <style:style style:name="PréformatéHTMLCar" style:display-name="Préformaté HTML Car" style:family="text" style:parent-style-name="Policepardéfaut">
      <style:text-properties style:font-name="Consolas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alérie Touffet</meta:initial-creator>
    <dc:creator>Valérie Touffet</dc:creator>
    <meta:creation-date>2026-05-10T16:26:00Z</meta:creation-date>
    <dc:date>2026-05-10T21:15:00Z</dc:date>
    <meta:template xlink:href="Normal.dotm" xlink:type="simple"/>
    <meta:editing-cycles>3</meta:editing-cycles>
    <meta:editing-duration>PT16800S</meta:editing-duration>
    <meta:document-statistic meta:page-count="3" meta:paragraph-count="1" meta:word-count="140" meta:character-count="915" meta:row-count="6" meta:non-whitespace-character-count="776"/>
  </office:meta>
</office:document-meta>
</file>